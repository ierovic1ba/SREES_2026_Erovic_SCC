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54600005D1F000048737CEC910F.svg" manifest:media-type="image/svg+xml"/>
  <manifest:file-entry manifest:full-path="Pictures/1000000100000322000002700470AA2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Uobičajeno">
        <draw:frame draw:style-name="gr1" draw:text-style-name="P1" draw:layer="layout" svg:width="23.838cm" svg:height="18.546cm" svg:x="0cm" svg:y="0cm">
          <draw:image xlink:href="Pictures/1000154600005D1F000048737CEC910F.svg" xlink:type="simple" xlink:show="embed" xlink:actuate="onLoad" draw:mime-type="image/svg+xml">
            <text:p/>
          </draw:image>
          <draw:image xlink:href="Pictures/1000000100000322000002700470AA2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1cm" fo:margin-bottom="0.861cm" fo:margin-left="0.861cm" fo:margin-right="0.861cm" fo:page-width="23.839cm" fo:page-height="18.5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Uobičajen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6.2.4.2$Windows_X86_64 LibreOffice_project/0229ac93fcf0d7cbc6376066c6f35021cef002dc</meta:generator>
  </office:meta>
</office:document-meta>
</file>